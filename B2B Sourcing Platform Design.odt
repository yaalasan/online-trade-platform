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5.5in" fo:margin-left="-0.075in" fo:margin-top="0in" fo:margin-bottom="0in" table:align="left" style:writing-mode="lr-tb"/>
    </style:style>
    <style:style style:name="Table1.A" style:family="table-column">
      <style:table-column-properties style:column-width="5.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5.5in" fo:margin-left="-0.075in" fo:margin-top="0in" fo:margin-bottom="0in" table:align="left" style:writing-mode="lr-tb"/>
    </style:style>
    <style:style style:name="Table2.A" style:family="table-column">
      <style:table-column-properties style:column-width="5.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5.5in" fo:margin-left="-0.075in" fo:margin-top="0in" fo:margin-bottom="0in" table:align="left" style:writing-mode="lr-tb"/>
    </style:style>
    <style:style style:name="Table3.A" style:family="table-column">
      <style:table-column-properties style:column-width="5.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5.5in" fo:margin-left="-0.075in" fo:margin-top="0in" fo:margin-bottom="0in" table:align="left" style:writing-mode="lr-tb"/>
    </style:style>
    <style:style style:name="Table4.A" style:family="table-column">
      <style:table-column-properties style:column-width="5.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5.5in" fo:margin-left="-0.075in" fo:margin-top="0in" fo:margin-bottom="0in" table:align="left" style:writing-mode="lr-tb"/>
    </style:style>
    <style:style style:name="Table5.A" style:family="table-column">
      <style:table-column-properties style:column-width="5.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5.5in" fo:margin-left="-0.075in" fo:margin-top="0in" fo:margin-bottom="0in" table:align="left" style:writing-mode="lr-tb"/>
    </style:style>
    <style:style style:name="Table6.A" style:family="table-column">
      <style:table-column-properties style:column-width="5.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Table7" style:family="table">
      <style:table-properties style:width="5.5in" fo:margin-left="-0.075in" fo:margin-top="0in" fo:margin-bottom="0in" table:align="left" style:writing-mode="lr-tb"/>
    </style:style>
    <style:style style:name="Table7.A" style:family="table-column">
      <style:table-column-properties style:column-width="5.5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Table8" style:family="table">
      <style:table-properties style:width="5.5in" fo:margin-left="-0.075in" fo:margin-top="0in" fo:margin-bottom="0in" table:align="left" style:writing-mode="lr-tb"/>
    </style:style>
    <style:style style:name="Table8.A" style:family="table-column">
      <style:table-column-properties style:column-width="5.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 style:writing-mode="lr-tb"/>
    </style:style>
    <style:style style:name="Table9" style:family="table">
      <style:table-properties style:width="5.5in" fo:margin-left="-0.075in" fo:margin-top="0in" fo:margin-bottom="0in" table:align="left" style:writing-mode="lr-tb"/>
    </style:style>
    <style:style style:name="Table9.A" style:family="table-column">
      <style:table-column-properties style:column-width="5.5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 style:writing-mode="lr-tb"/>
    </style:style>
    <style:style style:name="Table10" style:family="table">
      <style:table-properties style:width="5.5in" fo:margin-left="-0.075in" fo:margin-top="0in" fo:margin-bottom="0in" table:align="left" style:writing-mode="lr-tb"/>
    </style:style>
    <style:style style:name="Table10.A" style:family="table-column">
      <style:table-column-properties style:column-width="5.5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none" style:writing-mode="lr-tb"/>
    </style:style>
    <style:style style:name="Table11" style:family="table">
      <style:table-properties style:width="5.5in" fo:margin-left="-0.075in" fo:margin-top="0in" fo:margin-bottom="0in" table:align="left" style:writing-mode="lr-tb"/>
    </style:style>
    <style:style style:name="Table11.A" style:family="table-column">
      <style:table-column-properties style:column-width="5.5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none" style:writing-mode="lr-tb"/>
    </style:style>
    <style:style style:name="Table12" style:family="table">
      <style:table-properties style:width="5.5in" fo:margin-left="-0.075in" fo:margin-top="0in" fo:margin-bottom="0in" table:align="left" style:writing-mode="lr-tb"/>
    </style:style>
    <style:style style:name="Table12.A" style:family="table-column">
      <style:table-column-properties style:column-width="5.5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none" style:writing-mode="lr-tb"/>
    </style:style>
    <style:style style:name="Table13" style:family="table">
      <style:table-properties style:width="5.5in" fo:margin-left="-0.075in" fo:margin-top="0in" fo:margin-bottom="0in" table:align="left" style:writing-mode="lr-tb"/>
    </style:style>
    <style:style style:name="Table13.A" style:family="table-column">
      <style:table-column-properties style:column-width="5.5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none" style:writing-mode="lr-tb"/>
    </style:style>
    <style:style style:name="Table14" style:family="table">
      <style:table-properties style:width="5.5in" fo:margin-left="-0.075in" fo:margin-top="0in" fo:margin-bottom="0in" table:align="left" style:writing-mode="lr-tb"/>
    </style:style>
    <style:style style:name="Table14.A" style:family="table-column">
      <style:table-column-properties style:column-width="5.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Compact">
      <style:paragraph-properties fo:text-align="left" style:justify-single-word="false" fo:orphans="2" fo:widows="2"/>
      <style:text-properties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Standard" style:list-style-name="WWNum1001"/>
    <style:style style:name="P3" style:family="paragraph" style:parent-style-name="Compact" style:list-style-name="WWNum1002"/>
    <style:style style:name="P4" style:family="paragraph" style:parent-style-name="Compact" style:list-style-name="WWNum1003"/>
    <style:style style:name="P5" style:family="paragraph" style:parent-style-name="Compact" style:list-style-name="WWNum1004"/>
    <style:style style:name="P6" style:family="paragraph" style:parent-style-name="Compact" style:list-style-name="WWNum1005"/>
    <style:style style:name="P7" style:family="paragraph" style:parent-style-name="Compact" style:list-style-name="WWNum1006"/>
    <style:style style:name="P8" style:family="paragraph" style:parent-style-name="Compact" style:list-style-name="WWNum1007"/>
    <style:style style:name="P9" style:family="paragraph" style:parent-style-name="Compact" style:list-style-name="WWNum1008"/>
    <style:style style:name="P10" style:family="paragraph" style:parent-style-name="Compact" style:list-style-name="WWNum1009"/>
    <style:style style:name="P11" style:family="paragraph" style:parent-style-name="Compact" style:list-style-name="WWNum1010"/>
    <style:style style:name="P12" style:family="paragraph" style:parent-style-name="Compact" style:list-style-name="WWNum1011"/>
    <style:style style:name="P13" style:family="paragraph" style:parent-style-name="Compact" style:list-style-name="WWNum1012"/>
    <style:style style:name="P14" style:family="paragraph" style:parent-style-name="Compact" style:list-style-name="WWNum1013"/>
    <style:style style:name="P15" style:family="paragraph" style:parent-style-name="Compact" style:list-style-name="WWNum1014"/>
    <style:style style:name="P16" style:family="paragraph" style:parent-style-name="Compact" style:list-style-name="WWNum1015"/>
    <style:style style:name="P17" style:family="paragraph" style:parent-style-name="Text_20_body">
      <style:paragraph-properties fo:margin-top="0.0252in" fo:margin-bottom="0.0252in" style:contextual-spacing="false"/>
    </style:style>
    <style:style style:name="P18" style:family="paragraph" style:parent-style-name="Text_20_body" style:list-style-name="L1">
      <style:paragraph-properties fo:margin-top="0.0252in" fo:margin-bottom="0.0252in" style:contextual-spacing="false"/>
    </style:style>
    <style:style style:name="P19" style:family="paragraph" style:parent-style-name="Text_20_body" style:list-style-name="L2">
      <style:paragraph-properties fo:margin-top="0.0252in" fo:margin-bottom="0.0252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First_20_Paragraph">You are a senior staff engineer, principal architect, cybersecurity engineer, DevSecOps engineer, database architect, product engineer and QA lead.</text:p>
      <text:p text:style-name="Text_20_body">Your task is to build a production-grade B2B sourcing platform connecting international buyers with Chinese manufacturers.</text:p>
      <text:p text:style-name="Text_20_body">IMPORTANT:</text:p>
      <text:p text:style-name="Text_20_body">This is NOT an AI wrapper.</text:p>
      <text:p text:style-name="Text_20_body">This is NOT a landing page.</text:p>
      <text:p text:style-name="Text_20_body">This is NOT a frontend-first project.</text:p>
      <text:p text:style-name="Text_20_body">The backend architecture, security model, business logic, database integrity, and scalability are more important than visuals.</text:p>
      <text:p text:style-name="Text_20_body">You must think like a human software architect designing a company that expects millions in trade volume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PRODUCT VISION</text:p>
          </table:table-cell>
        </table:table-row>
      </table:table>
      <text:p text:style-name="Text_20_body">Platform name: temporary placeholder</text:p>
      <text:p text:style-name="Text_20_body">Mission:</text:p>
      <text:p text:style-name="Text_20_body">Connect foreign buyers with Chinese manufacturers while removing language barriers, sourcing difficulties, trust issues, and operational friction.</text:p>
      <text:p text:style-name="Text_20_body">The platform acts as an intelligent sourcing operating system.</text:p>
      <text:p text:style-name="Text_20_body">Users:</text:p>
      <text:list xml:id="list3290480810" text:style-name="WWNum1001">
        <text:list-item text:start-value="1">
          <text:p text:style-name="P2">Buyers</text:p>
        </text:list-item>
      </text:list>
      <text:list xml:id="list2519956661" text:style-name="WWNum1002">
        <text:list-item>
          <text:list>
            <text:list-item>
              <text:p text:style-name="P3">Importers</text:p>
            </text:list-item>
            <text:list-item>
              <text:p text:style-name="P3">Amazon sellers</text:p>
            </text:list-item>
            <text:list-item>
              <text:p text:style-name="P3">Retail brands</text:p>
            </text:list-item>
            <text:list-item>
              <text:p text:style-name="P3">Wholesalers</text:p>
            </text:list-item>
            <text:list-item>
              <text:p text:style-name="P3">Small businesses</text:p>
            </text:list-item>
          </text:list>
        </text:list-item>
      </text:list>
      <text:list xml:id="list105716851619044" text:continue-list="list3290480810" text:style-name="WWNum1001">
        <text:list-item>
          <text:p text:style-name="P2">Manufacturers</text:p>
        </text:list-item>
      </text:list>
      <text:list xml:id="list105717920866081" text:continue-list="list2519956661" text:style-name="WWNum1003">
        <text:list-item>
          <text:list>
            <text:list-item>
              <text:p text:style-name="P4">Chinese factories</text:p>
            </text:list-item>
            <text:list-item>
              <text:p text:style-name="P4">Verified suppliers</text:p>
            </text:list-item>
            <text:list-item>
              <text:p text:style-name="P4">Raw material providers</text:p>
            </text:list-item>
          </text:list>
        </text:list-item>
      </text:list>
      <text:list xml:id="list105716618401444" text:continue-list="list105716851619044" text:style-name="WWNum1001">
        <text:list-item>
          <text:p text:style-name="P2"><text:soft-page-break/>Internal Staff</text:p>
        </text:list-item>
      </text:list>
      <text:list xml:id="list105717730444192" text:continue-list="list105717920866081" text:style-name="WWNum1004">
        <text:list-item>
          <text:list>
            <text:list-item>
              <text:p text:style-name="P5">Admins</text:p>
            </text:list-item>
            <text:list-item>
              <text:p text:style-name="P5">Sourcing managers</text:p>
            </text:list-item>
            <text:list-item>
              <text:p text:style-name="P5">Compliance staff</text:p>
            </text:list-item>
            <text:list-item>
              <text:p text:style-name="P5">Factory verification team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CORE FEATURES</text:p>
          </table:table-cell>
        </table:table-row>
      </table:table>
      <text:p text:style-name="Text_20_body">Buyer Side</text:p>
      <text:list xml:id="list105717705070616" text:continue-list="list105717730444192" text:style-name="WWNum1005">
        <text:list-item>
          <text:p text:style-name="P6">Registration</text:p>
        </text:list-item>
        <text:list-item>
          <text:p text:style-name="P6">Identity verification</text:p>
        </text:list-item>
        <text:list-item>
          <text:p text:style-name="P6">Company profile</text:p>
        </text:list-item>
        <text:list-item>
          <text:p text:style-name="P6">RFQ creation</text:p>
        </text:list-item>
        <text:list-item>
          <text:p text:style-name="P6">Product request management</text:p>
        </text:list-item>
        <text:list-item>
          <text:p text:style-name="P6">Messaging</text:p>
        </text:list-item>
        <text:list-item>
          <text:p text:style-name="P6">File uploads</text:p>
        </text:list-item>
        <text:list-item>
          <text:p text:style-name="P6">Quote comparison</text:p>
        </text:list-item>
        <text:list-item>
          <text:p text:style-name="P6">Supplier shortlist</text:p>
        </text:list-item>
        <text:list-item>
          <text:p text:style-name="P6">Order tracking</text:p>
        </text:list-item>
        <text:list-item>
          <text:p text:style-name="P6">Dashboard</text:p>
        </text:list-item>
      </text:list>
      <text:p text:style-name="First_20_Paragraph">Manufacturer Side</text:p>
      <text:list xml:id="list105716304460840" text:continue-list="list105717705070616" text:style-name="WWNum1006">
        <text:list-item>
          <text:p text:style-name="P7">Factory profile</text:p>
        </text:list-item>
        <text:list-item>
          <text:p text:style-name="P7">Product categories</text:p>
        </text:list-item>
        <text:list-item>
          <text:p text:style-name="P7">Certifications</text:p>
        </text:list-item>
        <text:list-item>
          <text:p text:style-name="P7">Production capacity</text:p>
        </text:list-item>
        <text:list-item>
          <text:p text:style-name="P7">Quote submission</text:p>
        </text:list-item>
        <text:list-item>
          <text:p text:style-name="P7">RFQ management</text:p>
        </text:list-item>
        <text:list-item>
          <text:p text:style-name="P7">Messaging</text:p>
        </text:list-item>
        <text:list-item>
          <text:p text:style-name="P7">Sample requests</text:p>
        </text:list-item>
        <text:list-item>
          <text:p text:style-name="P7">Verification process</text:p>
        </text:list-item>
      </text:list>
      <text:p text:style-name="First_20_Paragraph">Admin Side</text:p>
      <text:list xml:id="list105716999355919" text:continue-list="list105716304460840" text:style-name="WWNum1007">
        <text:list-item>
          <text:p text:style-name="P8">User management</text:p>
        </text:list-item>
        <text:list-item>
          <text:p text:style-name="P8">Supplier verification</text:p>
        </text:list-item>
        <text:list-item>
          <text:p text:style-name="P8">Dispute handling</text:p>
        </text:list-item>
        <text:list-item>
          <text:p text:style-name="P8"><text:soft-page-break/>Audit logs</text:p>
        </text:list-item>
        <text:list-item>
          <text:p text:style-name="P8">Fraud monitoring</text:p>
        </text:list-item>
        <text:list-item>
          <text:p text:style-name="P8">Platform analytics</text:p>
        </text:list-item>
        <text:list-item>
          <text:p text:style-name="P8">Access management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PHASE 1 AI FEATURES</text:p>
          </table:table-cell>
        </table:table-row>
      </table:table>
      <text:p text:style-name="Text_20_body">AI must assist humans.</text:p>
      <text:p text:style-name="Text_20_body">AI does NOT make final decisions.</text:p>
      <text:p text:style-name="Text_20_body">Features:</text:p>
      <text:list xml:id="list105716416580703" text:continue-list="list105716999355919" text:style-name="WWNum1008">
        <text:list-item>
          <text:p text:style-name="P9">RFQ translation</text:p>
        </text:list-item>
        <text:list-item>
          <text:p text:style-name="P9">Chinese-English translation</text:p>
        </text:list-item>
        <text:list-item>
          <text:p text:style-name="P9">Supplier matching recommendations</text:p>
        </text:list-item>
        <text:list-item>
          <text:p text:style-name="P9">Quote comparison summaries</text:p>
        </text:list-item>
        <text:list-item>
          <text:p text:style-name="P9">Communication drafting</text:p>
        </text:list-item>
        <text:list-item>
          <text:p text:style-name="P9">Document analysis</text:p>
        </text:list-item>
      </text:list>
      <text:p text:style-name="First_20_Paragraph">All AI actions must be logged.</text:p>
      <text:p text:style-name="Text_20_body">All AI output must be reviewable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TECH STACK</text:p>
          </table:table-cell>
        </table:table-row>
      </table:table>
      <text:p text:style-name="Text_20_body">Backend:</text:p>
      <text:p text:style-name="Text_20_body">TypeScript Node.js NestJS</text:p>
      <text:p text:style-name="Text_20_body">Database:</text:p>
      <text:p text:style-name="Text_20_body">PostgreSQL</text:p>
      <text:p text:style-name="Text_20_body">ORM:</text:p>
      <text:p text:style-name="Text_20_body">Prisma</text:p>
      <text:p text:style-name="Text_20_body">Caching:</text:p>
      <text:p text:style-name="Text_20_body">Redis</text:p>
      <text:p text:style-name="Text_20_body">Search:</text:p>
      <text:p text:style-name="Text_20_body">OpenSearch or Elasticsearch</text:p>
      <text:p text:style-name="Text_20_body">Queue:</text:p>
      <text:p text:style-name="Text_20_body"><text:soft-page-break/>BullMQ</text:p>
      <text:p text:style-name="Text_20_body">Storage:</text:p>
      <text:p text:style-name="Text_20_body">S3 compatible storage</text:p>
      <text:p text:style-name="Text_20_body">Infrastructure:</text:p>
      <text:p text:style-name="Text_20_body">Docker Kubernetes ready</text:p>
      <text:p text:style-name="Text_20_body">CI/CD:</text:p>
      <text:p text:style-name="Text_20_body">GitHub Actions</text:p>
      <text:p text:style-name="Text_20_body">Frontend:</text:p>
      <text:p text:style-name="Text_20_body">Next.js TypeScript</text:p>
      <text:p text:style-name="Text_20_body">Authentication:</text:p>
      <text:p text:style-name="Text_20_body">JWT access tokens Refresh tokens</text:p>
      <text:p text:style-name="Text_20_body">Optional:</text:p>
      <text:p text:style-name="Text_20_body">OAuth Google OAuth Microsoft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DATABASE REQUIREMENTS</text:p>
          </table:table-cell>
        </table:table-row>
      </table:table>
      <text:p text:style-name="Text_20_body">Design proper relational schema.</text:p>
      <text:p text:style-name="Text_20_body">Include:</text:p>
      <text:p text:style-name="Text_20_body">Users Roles Permissions Organizations Factories Products RFQs Quotes Orders Messages Attachments AI Logs Audit Logs Notifications Supplier Verifications Disputes Payments Activity History</text:p>
      <text:p text:style-name="Text_20_body">Use:</text:p>
      <text:list xml:id="list105717000537923" text:continue-list="list105716416580703" text:style-name="WWNum1009">
        <text:list-item>
          <text:p text:style-name="P10">Foreign keys</text:p>
        </text:list-item>
        <text:list-item>
          <text:p text:style-name="P10">Constraints</text:p>
        </text:list-item>
        <text:list-item>
          <text:p text:style-name="P10">Indexes</text:p>
        </text:list-item>
        <text:list-item>
          <text:p text:style-name="P10">Soft deletes where appropriate</text:p>
        </text:list-item>
        <text:list-item>
          <text:p text:style-name="P10">Optimized query patterns</text:p>
        </text:list-item>
      </text:list>
      <text:p text:style-name="First_20_Paragraph">Generate ERD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SECURITY REQUIREMENTS</text:p>
          </table:table-cell>
        </table:table-row>
      </table:table>
      <text:p text:style-name="Text_20_body"><text:soft-page-break/>Treat platform as a high-value target.</text:p>
      <text:p text:style-name="Text_20_body">Implement:</text:p>
      <text:p text:style-name="Text_20_body">OWASP Top 10 protections</text:p>
      <text:p text:style-name="Text_20_body">Rate limiting</text:p>
      <text:p text:style-name="Text_20_body">CSRF protection</text:p>
      <text:p text:style-name="Text_20_body">XSS protection</text:p>
      <text:p text:style-name="Text_20_body">SQL injection protection</text:p>
      <text:p text:style-name="Text_20_body">SSRF protection</text:p>
      <text:p text:style-name="Text_20_body">RCE protection</text:p>
      <text:p text:style-name="Text_20_body">Secure headers</text:p>
      <text:p text:style-name="Text_20_body">Content Security Policy</text:p>
      <text:p text:style-name="Text_20_body">Input validation</text:p>
      <text:p text:style-name="Text_20_body">Output sanitization</text:p>
      <text:p text:style-name="Text_20_body">Secrets management</text:p>
      <text:p text:style-name="Text_20_body">Encrypted storage</text:p>
      <text:p text:style-name="Text_20_body">Encrypted backups</text:p>
      <text:p text:style-name="Text_20_body">Encryption at rest</text:p>
      <text:p text:style-name="Text_20_body">Encryption in transit</text:p>
      <text:p text:style-name="Text_20_body">Role-based access control</text:p>
      <text:p text:style-name="Text_20_body">Attribute-based access control</text:p>
      <text:p text:style-name="Text_20_body">Audit trails</text:p>
      <text:p text:style-name="Text_20_body">Session security</text:p>
      <text:p text:style-name="Text_20_body">Device monitoring</text:p>
      <text:p text:style-name="Text_20_body">Suspicious login detection</text:p>
      <text:p text:style-name="Text_20_body">IP reputation checks</text:p>
      <text:p text:style-name="Text_20_body"><text:soft-page-break/>Account lockout policies</text:p>
      <text:p text:style-name="Text_20_body">Brute force prevention</text:p>
      <text:p text:style-name="Text_20_body">Bot protection</text:p>
      <text:p text:style-name="Text_20_body">DDoS mitigation readiness</text:p>
      <text:p text:style-name="Text_20_body">Secure file uploads</text:p>
      <text:p text:style-name="Text_20_body">Virus scanning</text:p>
      <text:p text:style-name="Text_20_body">Malware scanning</text:p>
      <text:p text:style-name="Text_20_body">File type validation</text:p>
      <text:p text:style-name="Text_20_body">File size validation</text:p>
      <text:p text:style-name="Text_20_body">Secure object storage access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">COMPLIANCE</text:p>
          </table:table-cell>
        </table:table-row>
      </table:table>
      <text:p text:style-name="Text_20_body">Design system to support:</text:p>
      <text:p text:style-name="Text_20_body">GDPR</text:p>
      <text:p text:style-name="Text_20_body">CCPA</text:p>
      <text:p text:style-name="Text_20_body">Data retention policies</text:p>
      <text:p text:style-name="Text_20_body">Data deletion requests</text:p>
      <text:p text:style-name="Text_20_body">Audit requirements</text:p>
      <text:p text:style-name="Text_20_body">Consent management</text:p>
      <text:p text:style-name="Text_20_body">Cookie management</text:p>
      <text:p text:style-name="Text_20_body">Privacy controls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">MESSAGING SYSTEM</text:p>
          </table:table-cell>
        </table:table-row>
      </table:table>
      <text:p text:style-name="Text_20_body">Build real messaging infrastructure.</text:p>
      <text:p text:style-name="Text_20_body">Requirements:</text:p>
      <text:list xml:id="list105716680544870" text:continue-list="list105717000537923" text:style-name="WWNum1010">
        <text:list-item>
          <text:p text:style-name="P11">Buyer ↔ Supplier messaging</text:p>
        </text:list-item>
        <text:list-item>
          <text:p text:style-name="P11">Threading</text:p>
        </text:list-item>
        <text:list-item>
          <text:p text:style-name="P11">Attachments</text:p>
        </text:list-item>
        <text:list-item>
          <text:p text:style-name="P11"><text:soft-page-break/>Read receipts</text:p>
        </text:list-item>
        <text:list-item>
          <text:p text:style-name="P11">Notifications</text:p>
        </text:list-item>
        <text:list-item>
          <text:p text:style-name="P11">Message history</text:p>
        </text:list-item>
        <text:list-item>
          <text:p text:style-name="P11">Audit logging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">SUPPLIER VERIFICATION SYSTEM</text:p>
          </table:table-cell>
        </table:table-row>
      </table:table>
      <text:p text:style-name="Text_20_body">Factories cannot self-verify.</text:p>
      <text:p text:style-name="Text_20_body">Verification workflow:</text:p>
      <text:list xml:id="list105716147797579" text:continue-list="list105716618401444" text:style-name="WWNum1011">
        <text:list-item text:start-value="1">
          <text:p text:style-name="P12">Application</text:p>
        </text:list-item>
        <text:list-item>
          <text:p text:style-name="P12">Document review</text:p>
        </text:list-item>
        <text:list-item>
          <text:p text:style-name="P12">Manual approval</text:p>
        </text:list-item>
        <text:list-item>
          <text:p text:style-name="P12">Verification status</text:p>
        </text:list-item>
        <text:list-item>
          <text:p text:style-name="P12">Periodic review</text:p>
        </text:list-item>
      </text:list>
      <text:p text:style-name="First_20_Paragraph">Track:</text:p>
      <text:p text:style-name="Text_20_body">Business license Factory certificates Ownership information Factory address Verification evidence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">OBSERVABILITY</text:p>
          </table:table-cell>
        </table:table-row>
      </table:table>
      <text:p text:style-name="Text_20_body">Implement:</text:p>
      <text:p text:style-name="Text_20_body">Structured logging</text:p>
      <text:p text:style-name="Text_20_body">Metrics</text:p>
      <text:p text:style-name="Text_20_body">Tracing</text:p>
      <text:p text:style-name="Text_20_body">Error tracking</text:p>
      <text:p text:style-name="Text_20_body">Performance monitoring</text:p>
      <text:p text:style-name="Text_20_body">Health checks</text:p>
      <text:p text:style-name="Text_20_body">Audit dashboards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">TESTING REQUIREMENTS</text:p>
          </table:table-cell>
        </table:table-row>
      </table:table>
      <text:p text:style-name="Text_20_body">Write:</text:p>
      <text:p text:style-name="Text_20_body">Unit tests</text:p>
      <text:p text:style-name="Text_20_body">Integration tests</text:p>
      <text:p text:style-name="Text_20_body"><text:soft-page-break/>E2E tests</text:p>
      <text:p text:style-name="Text_20_body">Security tests</text:p>
      <text:p text:style-name="Text_20_body">Permission tests</text:p>
      <text:p text:style-name="Text_20_body">Database tests</text:p>
      <text:p text:style-name="Text_20_body">Load tests</text:p>
      <text:p text:style-name="Text_20_body">Stress tests</text:p>
      <text:p text:style-name="Text_20_body">Critical workflow tests</text:p>
      <text:p text:style-name="Text_20_body">Target:</text:p>
      <text:p text:style-name="Text_20_body">Minimum 85% backend coverage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">DEVELOPMENT RULES</text:p>
          </table:table-cell>
        </table:table-row>
      </table:table>
      <text:p text:style-name="Text_20_body">Before generating code:</text:p>
      <text:list xml:id="list105715863019397" text:continue-list="list105716147797579" text:style-name="WWNum1012">
        <text:list-item text:start-value="1">
          <text:p text:style-name="P13">Design architecture</text:p>
        </text:list-item>
        <text:list-item>
          <text:p text:style-name="P13">Design database</text:p>
        </text:list-item>
        <text:list-item>
          <text:p text:style-name="P13">Design APIs</text:p>
        </text:list-item>
        <text:list-item>
          <text:p text:style-name="P13">Design security model</text:p>
        </text:list-item>
        <text:list-item>
          <text:p text:style-name="P13">Design permissions</text:p>
        </text:list-item>
        <text:list-item>
          <text:p text:style-name="P13">Design deployment strategy</text:p>
        </text:list-item>
      </text:list>
      <text:p text:style-name="First_20_Paragraph">After code generation:</text:p>
      <text:list xml:id="list105717485209508" text:continue-list="list105716680544870" text:style-name="WWNum1013">
        <text:list-item>
          <text:p text:style-name="P14">Review code</text:p>
        </text:list-item>
        <text:list-item>
          <text:p text:style-name="P14">Detect bugs</text:p>
        </text:list-item>
        <text:list-item>
          <text:p text:style-name="P14">Refactor</text:p>
        </text:list-item>
        <text:list-item>
          <text:p text:style-name="P14">Re-run checks</text:p>
        </text:list-item>
        <text:list-item>
          <text:p text:style-name="P14">Verify security assumptions</text:p>
        </text:list-item>
        <text:list-item>
          <text:p text:style-name="P14">Verify type safety</text:p>
        </text:list-item>
      </text:list>
      <text:p text:style-name="First_20_Paragraph">Never generate placeholder business logic.</text:p>
      <text:p text:style-name="Text_20_body">Never create fake implementations.</text:p>
      <text:p text:style-name="Text_20_body">Every endpoint must have real validation.</text:p>
      <text:p text:style-name="Text_20_body">Every service must have real authorization checks.</text:p>
      <text:p text:style-name="Text_20_body"><text:soft-page-break/>Every database operation must handle errors.</text:p>
      <text:p text:style-name="Text_20_body">Every API must be documented.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">DESIGN REQUIREMENTS</text:p>
          </table:table-cell>
        </table:table-row>
      </table:table>
      <text:p text:style-name="Text_20_body">NO AI startup aesthetic.</text:p>
      <text:p text:style-name="Text_20_body">Avoid:</text:p>
      <text:list text:continue-list="list105717485209508" text:style-name="WWNum1014">
        <text:list-item>
          <text:p text:style-name="P15">Purple gradients</text:p>
        </text:list-item>
        <text:list-item>
          <text:p text:style-name="P15">Neon colors</text:p>
        </text:list-item>
        <text:list-item>
          <text:p text:style-name="P15">Futuristic glow</text:p>
        </text:list-item>
        <text:list-item>
          <text:p text:style-name="P15">Generic SaaS templates</text:p>
        </text:list-item>
      </text:list>
      <text:p text:style-name="First_20_Paragraph">Design should feel:</text:p>
      <text:p text:style-name="Text_20_body">Industrial Professional Trustworthy Global trade focused</text:p>
      <text:p text:style-name="Text_20_body">Visual inspiration:</text:p>
      <text:p text:style-name="Text_20_body">Enterprise procurement systems Supply chain platforms Industrial software Financial software</text:p>
      <text:p text:style-name="Text_20_body">Prioritize usability over trendiness.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">DELIVERABLES</text:p>
          </table:table-cell>
        </table:table-row>
      </table:table>
      <text:p text:style-name="Text_20_body">Generate:</text:p>
      <text:list text:continue-list="list105715863019397" text:style-name="WWNum1015">
        <text:list-item text:start-value="1">
          <text:p text:style-name="P16">Full system architecture</text:p>
        </text:list-item>
        <text:list-item>
          <text:p text:style-name="P16">Database schema</text:p>
        </text:list-item>
        <text:list-item>
          <text:p text:style-name="P16">ERD</text:p>
        </text:list-item>
        <text:list-item>
          <text:p text:style-name="P16">Backend structure</text:p>
        </text:list-item>
        <text:list-item>
          <text:p text:style-name="P16">API design</text:p>
        </text:list-item>
        <text:list-item>
          <text:p text:style-name="P16">Security architecture</text:p>
        </text:list-item>
        <text:list-item>
          <text:p text:style-name="P16">Infrastructure architecture</text:p>
        </text:list-item>
        <text:list-item>
          <text:p text:style-name="P16">Frontend architecture</text:p>
        </text:list-item>
        <text:list-item>
          <text:p text:style-name="P16">Test strategy</text:p>
        </text:list-item>
        <text:list-item>
          <text:p text:style-name="P16">CI/CD strategy</text:p>
        </text:list-item>
        <text:list-item>
          <text:p text:style-name="P16">Deployment guide</text:p>
        </text:list-item>
        <text:list-item>
          <text:p text:style-name="P16"><text:soft-page-break/>Production readiness checklist<text:line-break/><text:line-break/></text:p>
        </text:list-item>
      </text:list>
      <text:p text:style-name="Compact"/>
      <text:p text:style-name="Compact"/>
      <text:p text:style-name="P17">PAYMENT AND TRUST ARCHITECTURE</text:p>
      <text:p text:style-name="P17">The platform handles real trade transactions.</text:p>
      <text:p text:style-name="P17">Design a financial-grade trust system.</text:p>
      <text:p text:style-name="P17">Requirements:</text:p>
      <text:list text:style-name="L1">
        <text:list-item>
          <text:p text:style-name="P18">Buyer identity verification</text:p>
        </text:list-item>
        <text:list-item>
          <text:p text:style-name="P18">Business verification</text:p>
        </text:list-item>
        <text:list-item>
          <text:p text:style-name="P18">Supplier identity verification</text:p>
        </text:list-item>
        <text:list-item>
          <text:p text:style-name="P18">Supplier business verification</text:p>
        </text:list-item>
        <text:list-item>
          <text:p text:style-name="P18">KYC</text:p>
        </text:list-item>
        <text:list-item>
          <text:p text:style-name="P18">KYB</text:p>
        </text:list-item>
        <text:list-item>
          <text:p text:style-name="P18">AML readiness</text:p>
        </text:list-item>
        <text:list-item>
          <text:p text:style-name="P18">Sanctions screening</text:p>
        </text:list-item>
        <text:list-item>
          <text:p text:style-name="P18">Escrow workflow</text:p>
        </text:list-item>
        <text:list-item>
          <text:p text:style-name="P18">Transaction audit trails</text:p>
        </text:list-item>
        <text:list-item>
          <text:p text:style-name="P18">Payment reconciliation</text:p>
        </text:list-item>
        <text:list-item>
          <text:p text:style-name="P18">Fraud monitoring</text:p>
        </text:list-item>
        <text:list-item>
          <text:p text:style-name="P18">Risk scoring</text:p>
        </text:list-item>
      </text:list>
      <text:p text:style-name="P17">No direct money movement logic should be implemented manually.</text:p>
      <text:p text:style-name="P17">Use regulated payment providers.</text:p>
      <text:p text:style-name="P17">Design abstraction layer for:</text:p>
      <text:list text:style-name="L2">
        <text:list-item>
          <text:p text:style-name="P19">Stripe</text:p>
        </text:list-item>
        <text:list-item>
          <text:p text:style-name="P19">Adyen</text:p>
        </text:list-item>
        <text:list-item>
          <text:p text:style-name="P19">Airwallex</text:p>
        </text:list-item>
        <text:list-item>
          <text:p text:style-name="P19">Wise Platform</text:p>
        </text:list-item>
      </text:list>
      <text:p text:style-name="P17">All payment providers must be swappable.</text:p>
      <text:p text:style-name="P17">Store no raw card information.</text:p>
      <text:p text:style-name="P17">Use tokenized payment methods only.</text:p>
      <text:p text:style-name="P17">Every financial event must be logged.</text:p>
      <text:p text:style-name="P17">Implement immutable transaction history.</text:p>
      <text:p text:style-name="P17">Implement dispute workflows.</text:p>
      <text:p text:style-name="P17">Implement chargeback workflows.</text:p>
      <text:p text:style-name="P17"><text:soft-page-break/>Implement refund workflows.</text:p>
      <text:p text:style-name="P17">Implement evidence collection workflows.</text:p>
      <text:p text:style-name="Compact"/>
      <text:p text:style-name="First_20_Paragraph">Build in phases and stop after each phase for review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5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6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7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8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9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0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1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2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3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4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5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8T02:56:10</meta:creation-date>
    <dc:date>2026-06-08T10:57:15.694034016</dc:date>
    <meta:generator>LibreOffice/26.2.3.2$Linux_X86_64 LibreOffice_project/620$Build-2</meta:generator>
    <meta:editing-duration>PT6M53S</meta:editing-duration>
    <meta:editing-cycles>1</meta:editing-cycles>
    <meta:document-statistic meta:table-count="14" meta:image-count="0" meta:object-count="0" meta:page-count="11" meta:paragraph-count="277" meta:word-count="897" meta:character-count="6191" meta:non-whitespace-character-count="5679"/>
    <meta:user-defined meta:name="AppVersion">12.0000</meta:user-defined>
    <meta:template xlink:type="simple" xlink:actuate="onRequest" xlink:title="Normal.dotm" xlink:href=""/>
  </office:meta>
</office:document-meta>
</file>